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bullet text:level="1" text:style-name="WW_CharLFO2LVL1" text:bullet-char="＊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/>
      <style:text-properties style:font-name="標楷體" style:font-name-asian="標楷體" fo:font-weight="bold" style:font-weight-asian="bold" fo:font-size="16pt" style:font-size-asian="16pt" style:font-size-complex="16pt"/>
    </style:style>
    <style:style style:name="P2" style:parent-style-name="內文" style:list-style-name="LFO1" style:family="paragraph">
      <style:text-properties style:font-name="標楷體" style:font-name-asian="標楷體" fo:font-weight="bold" style:font-weight-asian="bold" fo:font-size="14pt" style:font-size-asian="14pt" style:font-size-complex="14pt"/>
    </style:style>
    <style:style style:name="P3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4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5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6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7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8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9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0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1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2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3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4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5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6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7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8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19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0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1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2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3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4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5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6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7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8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29" style:parent-style-name="內文" style:family="paragraph">
      <style:paragraph-properties fo:text-indent="0.2486in"/>
      <style:text-properties style:font-name="標楷體" style:font-name-asian="標楷體" fo:font-size="14pt" style:font-size-asian="14pt" style:font-size-complex="14pt"/>
    </style:style>
    <style:style style:name="P30" style:parent-style-name="內文" style:list-style-name="LFO1" style:family="paragraph">
      <style:text-properties style:font-name="標楷體" style:font-name-asian="標楷體" fo:font-weight="bold" style:font-weight-asian="bold" fo:font-size="14pt" style:font-size-asian="14pt" style:font-size-complex="14pt"/>
    </style:style>
    <style:style style:name="P31" style:parent-style-name="內文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2" style:parent-style-name="內文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3" style:parent-style-name="內文" style:family="paragraph">
      <style:paragraph-properties fo:margin-left="0.25in" fo:margin-right="-0.4819in" fo:text-indent="0.388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4" style:parent-style-name="內文" style:list-style-name="LFO2" style:family="paragraph">
      <style:paragraph-properties fo:margin-right="-0.6069in"/>
      <style:text-properties style:font-name="標楷體" style:font-name-asian="標楷體" fo:font-size="14pt" style:font-size-asian="14pt" style:font-size-complex="14pt"/>
    </style:style>
    <style:style style:name="P35" style:parent-style-name="內文" style:family="paragraph">
      <style:paragraph-properties fo:margin-left="0.25in" fo:margin-right="-0.6069in">
        <style:tab-stops/>
      </style:paragraph-properties>
    </style:style>
    <style:style style:name="T3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0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P41" style:parent-style-name="內文" style:family="paragraph">
      <style:paragraph-properties fo:margin-left="0.25in" fo:margin-right="-0.6069in">
        <style:tab-stops/>
      </style:paragraph-properties>
    </style:style>
    <style:style style:name="T4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5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P46" style:parent-style-name="內文" style:family="paragraph">
      <style:paragraph-properties fo:margin-left="0.4986in" fo:margin-right="0.0166in" fo:text-indent="-0.2486in">
        <style:tab-stops/>
      </style:paragraph-properties>
    </style:style>
    <style:style style:name="T4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P51" style:parent-style-name="內文" style:list-style-name="LFO2" style:family="paragraph">
      <style:paragraph-properties fo:margin-right="0.0166in"/>
      <style:text-properties style:font-name="標楷體" style:font-name-asian="標楷體" fo:font-size="14pt" style:font-size-asian="14pt" style:font-size-complex="14pt"/>
    </style:style>
    <style:style style:name="P52" style:parent-style-name="內文" style:list-style-name="LFO1" style:family="paragraph">
      <style:paragraph-properties fo:margin-right="-0.6069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P53" style:parent-style-name="內文" style:list-style-name="LFO1" style:family="paragraph">
      <style:paragraph-properties fo:margin-right="0.0166in"/>
      <style:text-properties style:font-name="標楷體" style:font-name-asian="標楷體" fo:font-size="14pt" style:font-size-asian="14pt" style:font-size-complex="14pt"/>
    </style:style>
    <style:style style:name="P54" style:parent-style-name="內文" style:list-style-name="LFO1" style:family="paragraph">
      <style:paragraph-properties fo:margin-right="0.0166in"/>
      <style:text-properties style:font-name="標楷體" style:font-name-asian="標楷體" fo:font-size="14pt" style:font-size-asian="14pt" style:font-size-complex="14pt"/>
    </style:style>
    <style:style style:name="P55" style:parent-style-name="內文" style:list-style-name="LFO1" style:family="paragraph">
      <style:paragraph-properties fo:margin-right="0.0166in"/>
      <style:text-properties style:font-name="標楷體" style:font-name-asian="標楷體" fo:font-size="14pt" style:font-size-asian="14pt" style:font-size-complex="14pt"/>
    </style:style>
    <style:style style:name="P56" style:parent-style-name="內文" style:list-style-name="LFO1" style:family="paragraph">
      <style:paragraph-properties fo:margin-right="0.0166in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5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6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2" style:parent-style-name="預設段落字型" style:family="text">
      <style:text-properties style:font-name="標楷體" style:font-name-asian="標楷體" fo:font-size="14pt" style:font-size-asian="14pt" style:font-size-complex="14pt"/>
    </style:style>
  </office:automatic-styles>
  <office:body>
    <office:text text:use-soft-page-breaks="true">
      <text:p text:style-name="P1">前30個交易日期貨每筆成交資料說明</text:p>
      <text:list text:style-name="LFO1" text:continue-numbering="true">
        <text:list-item>
          <text:p text:style-name="P2">商品代號說明</text:p>
        </text:list-item>
      </text:list>
      <text:p text:style-name="P3">TX：臺股期貨</text:p>
      <text:p text:style-name="P4">MTX：小型臺指期貨</text:p>
      <text:p text:style-name="P5">TE：電子期貨</text:p>
      <text:p text:style-name="P6">ZEF：小型電子期貨</text:p>
      <text:p text:style-name="P7">TF：金融期貨</text:p>
      <text:p text:style-name="P8">ZFF:<text:s/>小型金融期貨</text:p>
      <text:p text:style-name="P9">GDF：黃金期貨</text:p>
      <text:p text:style-name="P10">XIF：非金電期貨</text:p>
      <text:p text:style-name="P11">GTF：櫃買期貨</text:p>
      <text:p text:style-name="P12">TGF：新臺幣計價黃金期貨</text:p>
      <text:p text:style-name="P13">RHF：美元兌人民幣期貨</text:p>
      <text:p text:style-name="P14">RTF：小型美元兌人民幣期貨</text:p>
      <text:p text:style-name="P15">TJF：東證期貨</text:p>
      <text:p text:style-name="P16">XEF：歐元兌美元期貨</text:p>
      <text:p text:style-name="P17">XJF：美元兌日圓期貨</text:p>
      <text:p text:style-name="P18">XBF：英鎊兌美元期貨</text:p>
      <text:p text:style-name="P19">XAF：澳幣兌美元期貨</text:p>
      <text:p text:style-name="P20">UDF：美國道瓊期貨</text:p>
      <text:p text:style-name="P21">SPF：美國標普500期貨</text:p>
      <text:p text:style-name="P22">BRF：布蘭特原油期貨</text:p>
      <text:p text:style-name="P23">UNF：美國那斯達克100期貨</text:p>
      <text:p text:style-name="P24">G2F：富櫃200期貨</text:p>
      <text:p text:style-name="P25">BTF：臺灣生技期貨</text:p>
      <text:p text:style-name="P26">E4F：臺灣永續期貨</text:p>
      <text:p text:style-name="P27">F1F：英國富時100期貨</text:p>
      <text:p text:style-name="P28">SOF：半導體30期貨</text:p>
      <text:p text:style-name="P29">SHF：航運期貨</text:p>
      <text:list text:style-name="LFO1" text:continue-numbering="true">
        <text:list-item>
          <text:p text:style-name="P30">到期月份(週別)說明</text:p>
        </text:list-item>
      </text:list>
      <text:p text:style-name="P31">本表係以委託簿之概念，依該委託成交所在位置列出成交明細。倘若此委託成交在單式委託簿（即交割年月欄位僅單一月份），則將該成交明細以單式委託方式顯示；倘若此委託係成交在跨月價差委託簿（即交割月份欄位有兩交割月份），則將該成交明細以跨月價差委託方式顯示，其成交價格將為兩月份之價差，並增列近、遠月價格之欄位。</text:p>
      <text:p text:style-name="P32">例：200711：2007年11月單式委託簿成交資料</text:p>
      <text:soft-page-break/>
      <text:p text:style-name="P33">200711/200712：2007年11月對12月跨月價差委託簿成交資料</text:p>
      <text:list text:style-name="LFO2" text:continue-numbering="true">
        <text:list-item>
          <text:p text:style-name="P34">跨月價差委託成交對象有以下3種</text:p>
        </text:list-item>
      </text:list>
      <text:p text:style-name="P35"><text:span text:style-name="T36">a.</text:span><text:span text:style-name="T37">與相同交割年月但僅買賣方向不同之跨月價差委</text:span><text:span text:style-name="T38">託成交</text:span><text:span text:style-name="T39">.</text:span><text:span text:style-name="T40">（於跨月價差委託簿中撮合）</text:span></text:p>
      <text:p text:style-name="P41"><text:span text:style-name="T42">b.</text:span><text:span text:style-name="T43">與兩個別月份單式委託成交</text:span><text:span text:style-name="T44">.</text:span><text:span text:style-name="T45">（於單式委託簿中撮合）</text:span></text:p>
      <text:p text:style-name="P46"><text:span text:style-name="T47">c.</text:span><text:span text:style-name="T48">一隻腳與個別單式委託成交，另一隻腳與另一僅其中之一交割月份相同之跨月價差委託成交</text:span><text:span text:style-name="T49">.</text:span><text:span text:style-name="T50">（於單式委託簿中撮合）</text:span></text:p>
      <text:list text:style-name="LFO2" text:continue-numbering="true">
        <text:list-item>
          <text:p text:style-name="P51">上述狀況a.之成交明細資料列於跨月價差委託簿（即交割年月為兩不同月份，例：200711/200712）。狀況b.及c.之成交明細資料則列於個別單式月份之委託簿（即交割年月為單一月份，例：200711）</text:p>
        </text:list-item>
      </text:list>
      <text:list text:style-name="LFO1" text:continue-numbering="true">
        <text:list-item>
          <text:p text:style-name="P52">近月價格、遠月價格說明</text:p>
          <text:list text:continue-numbering="true">
            <text:list-item>
              <text:p text:style-name="P53">此兩欄位係針對跨月價差委託增設，故原單一交割月份下（例:200711），係以單式委託之角度列出成交明細，並無所謂近月或遠月價格，故該兩欄位將以”-“表示。</text:p>
            </text:list-item>
            <text:list-item>
              <text:p text:style-name="P54">凡屬於上述說明2之狀況a.者，將分別於此兩欄位中，列出該跨月價差委託成交之近月價格及遠月價格。</text:p>
            </text:list-item>
            <text:list-item>
              <text:p text:style-name="P55">另若是狀況b.及c.，亦即該跨月價差委託係至少與一單式委託成交者，由於其係於單式委託簿中撮合，兩隻腳已分別列於單式委託成交明細。</text:p>
            </text:list-item>
            <text:list-item>
              <text:p text:style-name="P56"><text:span text:style-name="T57">另有關跨月價差與單式委託成交之價差成交明細資料，則請參考「</text:span><text:span text:style-name="T58">前</text:span><text:span text:style-name="T59">30</text:span><text:span text:style-name="T60">個交易日期貨跨月價差每筆成交資料</text:span><text:span text:style-name="T61">」（該表將以跨月價差委託之角度列出</text:span><text:span text:style-name="T62">成交明細）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標楷體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bullet text:level="1" text:style-name="WW_CharLFO2LVL1" text:bullet-char="＊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前30個交易日期貨每筆成交資料說明</dc:title>
    <dc:subject/>
    <meta:initial-creator>jackie</meta:initial-creator>
    <dc:creator>資訊規劃部-陳玲玉</dc:creator>
    <meta:creation-date>2022-06-14T02:22:00Z</meta:creation-date>
    <dc:date>2022-09-22T05:54:00Z</dc:date>
    <meta:print-date>2021-03-12T07:53:00Z</meta:print-date>
    <meta:template xlink:href="Normal.dotm" xlink:type="simple"/>
    <meta:editing-cycles>3</meta:editing-cycles>
    <meta:editing-duration>PT0S</meta:editing-duration>
    <meta:document-statistic meta:page-count="2" meta:paragraph-count="2" meta:word-count="160" meta:character-count="1073" meta:row-count="7" meta:non-whitespace-character-count="915"/>
  </office:meta>
</office:document-meta>
</file>